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7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9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6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9.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text-properties fo:font-size="12pt" style:font-size-asian="12pt" style:font-size-complex="12pt"/>
      <style:map style:condition="of:is-true-formula(AND(NOT(ISBLANK([.C2]));ISBLANK([.E2])))" style:apply-style-name="cf6" style:base-cell-address="Data_Sheet.E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6" style:base-cell-address="Data_Sheet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6" style:base-cell-address="Data_Sheet.G2"/>
    </style:style>
    <style:style style:name="ce4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4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Q2]));ISBLANK([.P2])))" style:apply-style-name="cf6" style:base-cell-address="Data_Sheet.P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P2]));ISBLANK([.Q2])))" style:apply-style-name="cf6" style:base-cell-address="Data_Sheet.Q2"/>
    </style:style>
    <style:style style:name="ce4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6" style:base-cell-address="Data_Sheet.T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6" style:base-cell-address="Data_Sheet.U2"/>
    </style:style>
    <style:style style:name="ce5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5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6" style:base-cell-address="Data_Sheet.G5"/>
    </style:style>
    <style:style style:name="ce5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  <style:style style:name="ce5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58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6" style:base-cell-address="Data_Sheet.F5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6" style:base-cell-address="Data_Sheet.Y2"/>
    </style:style>
    <style:style style:name="ce6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  <style:style style:name="ce6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number-columns-repeated="31" table:default-cell-style-name="ce31"/>
        <table:table-column table:style-name="co7" table:default-cell-style-name="ce31"/>
        <table:table-column table:style-name="co6" table:number-columns-repeated="3" table:default-cell-style-name="ce31"/>
        <table:table-column table:style-name="co8" table:default-cell-style-name="ce31"/>
        <table:table-column table:style-name="co9" table:default-cell-style-name="ce31"/>
        <table:table-column table:style-name="co1" table:number-columns-repeated="16342" table:default-cell-style-name="ce3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42">
            <text:p>Home Office</text:p>
          </table:table-cell>
          <table:table-cell office:value-type="float" office:value="147" table:content-validation-name="val2" table:style-name="ce43">
            <text:p>147.00</text:p>
          </table:table-cell>
          <table:table-cell office:value-type="float" office:value="132.35" table:content-validation-name="val1" table:style-name="ce44">
            <text:p>132.35</text:p>
          </table:table-cell>
          <table:table-cell office:value-type="float" office:value="2300" table:content-validation-name="val2" table:style-name="ce43">
            <text:p>2300.00</text:p>
          </table:table-cell>
          <table:table-cell office:value-type="float" office:value="2213.1" table:content-validation-name="val1" table:style-name="ce44">
            <text:p>2213.10</text:p>
          </table:table-cell>
          <table:table-cell office:value-type="float" office:value="2835" table:content-validation-name="val2" table:style-name="ce43">
            <text:p>2835.00</text:p>
          </table:table-cell>
          <table:table-cell office:value-type="float" office:value="2754.43" table:content-validation-name="val1" table:style-name="ce44">
            <text:p>2754.43</text:p>
          </table:table-cell>
          <table:table-cell office:value-type="float" office:value="616" table:content-validation-name="val2" table:style-name="ce43">
            <text:p>616.00</text:p>
          </table:table-cell>
          <table:table-cell office:value-type="float" office:value="605.5" table:content-validation-name="val1" table:style-name="ce44">
            <text:p>605.50</text:p>
          </table:table-cell>
          <table:table-cell office:value-type="float" office:value="49" table:content-validation-name="val2" table:style-name="ce43">
            <text:p>49.00</text:p>
          </table:table-cell>
          <table:table-cell office:value-type="float" office:value="48.5" table:content-validation-name="val1" table:style-name="ce44">
            <text:p>48.50</text:p>
          </table:table-cell>
          <table:table-cell table:content-validation-name="val2" table:style-name="ce47"/>
          <table:table-cell table:content-validation-name="val1" table:style-name="ce48"/>
          <table:table-cell office:value-type="float" office:value="5947" table:formula="of:=SUM([.F2];[.H2];[.J2];[.L2];[.N2];[.P2])" table:content-validation-name="val7" table:style-name="ce8">
            <text:p>5,947</text:p>
          </table:table-cell>
          <table:table-cell office:value-type="float" office:value="5753.8799999999992" table:formula="of:=SUM([.G2];[.I2];[.K2];[.M2];[.O2];[.Q2])" table:content-validation-name="val7" table:style-name="ce8">
            <text:p>5,754</text:p>
          </table:table-cell>
          <table:table-cell office:value-type="float" office:value="1" table:content-validation-name="val4" table:style-name="ce51">
            <text:p>1</text:p>
          </table:table-cell>
          <table:table-cell office:value-type="float" office:value="1" table:content-validation-name="val1" table:style-name="ce52">
            <text:p>1.00</text:p>
          </table:table-cell>
          <table:table-cell office:value-type="float" office:value="172" table:content-validation-name="val4" table:style-name="ce51">
            <text:p>172</text:p>
          </table:table-cell>
          <table:table-cell office:value-type="float" office:value="169.52" table:content-validation-name="val1" table:style-name="ce52">
            <text:p>169.52</text:p>
          </table:table-cell>
          <table:table-cell office:value-type="float" office:value="0" table:content-validation-name="val1" table:style-name="ce52">
            <text:p>0.00</text:p>
          </table:table-cell>
          <table:table-cell office:value-type="float" office:value="0" table:content-validation-name="val3" table:style-name="ce59">
            <text:p>0.00</text:p>
          </table:table-cell>
          <table:table-cell office:value-type="float" office:value="173" table:formula="of:=SUM([.T2];[.V2];[.X2])" table:style-name="ce10">
            <text:p>173</text:p>
          </table:table-cell>
          <table:table-cell office:value-type="float" office:value="170.52" table:formula="of:=SUM([.U2];[.W2];[.Y2])" table:style-name="ce10">
            <text:p>171</text:p>
          </table:table-cell>
          <table:table-cell table:content-validation-name="val6" table:style-name="ce11"/>
          <table:table-cell office:value-type="float" office:value="6120" table:formula="of:=[.R2]+[.Z2]" table:content-validation-name="val7" table:style-name="ce12">
            <text:p>6,120</text:p>
          </table:table-cell>
          <table:table-cell office:value-type="float" office:value="5924.4" table:formula="of:=[.S2]+[.AA2]" table:content-validation-name="val7" table:style-name="ce12">
            <text:p>5,924</text:p>
          </table:table-cell>
          <table:table-cell office:value-type="currency" office:value="24439344.91" table:style-name="ce13">
            <text:p>£24,439,344.91</text:p>
          </table:table-cell>
          <table:table-cell office:value-type="currency" office:value="1143420.2599999998" table:style-name="ce13">
            <text:p>£1,143,420.26</text:p>
          </table:table-cell>
          <table:table-cell office:value-type="currency" office:value="650547.06000000006" table:style-name="ce13">
            <text:p>£650,547.06</text:p>
          </table:table-cell>
          <table:table-cell office:value-type="currency" office:value="3848648" table:style-name="ce13">
            <text:p>£3,848,648.00</text:p>
          </table:table-cell>
          <table:table-cell office:value-type="currency" office:value="7102723.9699999997" table:style-name="ce13">
            <text:p>£7,102,723.97</text:p>
          </table:table-cell>
          <table:table-cell office:value-type="currency" office:value="3608289.66" table:style-name="ce13">
            <text:p>£3,608,289.66</text:p>
          </table:table-cell>
          <table:table-cell office:value-type="currency" office:value="40792973.859999999" table:formula="of:=SUM([.AE2:.AJ2])" table:style-name="ce14">
            <text:p>£40,792,973.86</text:p>
          </table:table-cell>
          <table:table-cell office:value-type="currency" office:value="1741867.6800000002" table:content-validation-name="val5" table:style-name="ce15">
            <text:p>£1,741,867.68</text:p>
          </table:table-cell>
          <table:table-cell table:content-validation-name="val5" table:style-name="ce16"/>
          <table:table-cell office:value-type="currency" office:value="1741867.68" table:style-name="ce17">
            <text:p>£1,741,867.68</text:p>
          </table:table-cell>
          <table:table-cell office:value-type="currency" office:value="42534841.539999999" table:style-name="ce18">
            <text:p>£42,534,841.54</text:p>
          </table:table-cell>
          <table:table-cell table:style-name="ce19"/>
          <table:table-cell table:number-columns-repeated="9" table:style-name="ce20"/>
          <table:table-cell table:number-columns-repeated="16333" table:style-name="ce21"/>
        </table:table-row>
        <table:table-row table:number-rows-repeated="2" table:style-name="ro3">
          <table:table-cell table:number-columns-repeated="5" table:style-name="ce22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number-columns-repeated="2" table:style-name="ce24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style-name="ce32"/>
          <table:table-cell table:style-name="ce22"/>
          <table:table-cell table:number-columns-repeated="3" table:style-name="ce32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number-columns-repeated="2" table:style-name="ce24"/>
          <table:table-cell table:content-validation-name="val4" table:style-name="ce50"/>
          <table:table-cell table:content-validation-name="val1" table:style-name="ce54"/>
          <table:table-cell table:content-validation-name="val4" table:style-name="ce50"/>
          <table:table-cell table:content-validation-name="val1" table:style-name="ce54"/>
          <table:table-cell table:content-validation-name="val1" table:style-name="ce54"/>
          <table:table-cell table:content-validation-name="val3" table:style-name="ce61"/>
          <table:table-cell table:number-columns-repeated="2" table:style-name="ce24"/>
          <table:table-cell table:style-name="ce36"/>
          <table:table-cell table:number-columns-repeated="2" table:style-name="ce24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style-name="ce28"/>
          <table:table-cell table:content-validation-name="val5" table:style-name="ce38"/>
          <table:table-cell table:content-validation-name="val5" table:style-name="ce38"/>
          <table:table-cell table:style-name="ce28"/>
          <table:table-cell table:style-name="ce30"/>
          <table:table-cell table:style-name="ce32"/>
          <table:table-cell table:number-columns-repeated="9" table:style-name="ce39"/>
          <table:table-cell table:number-columns-repeated="16333" table:style-name="ce40"/>
        </table:table-row>
        <table:table-row table:style-name="ro3">
          <table:table-cell table:number-columns-repeated="5" table:style-name="ce22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number-columns-repeated="2" table:style-name="ce24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number-columns-repeated="5" table:style-name="ce22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number-columns-repeated="2" table:style-name="ce24"/>
          <table:table-cell table:content-validation-name="val4" table:style-name="ce50"/>
          <table:table-cell table:content-validation-name="val1" table:style-name="ce54"/>
          <table:table-cell table:content-validation-name="val4" table:style-name="ce50"/>
          <table:table-cell table:content-validation-name="val1" table:style-name="ce54"/>
          <table:table-cell table:content-validation-name="val1" table:style-name="ce54"/>
          <table:table-cell table:content-validation-name="val3" table:style-name="ce61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number-columns-repeated="36" table:style-name="ce31"/>
          <table:table-cell table:style-name="ce41"/>
          <table:table-cell table:number-columns-repeated="2" table:style-name="ce31"/>
          <table:table-cell table:number-columns-repeated="2" table:style-name="ce41"/>
          <table:table-cell table:number-columns-repeated="16343" table:style-name="ce31"/>
        </table:table-row>
        <table:table-row table:number-rows-repeated="5" table:style-name="ro3">
          <table:table-cell table:number-columns-repeated="36" table:style-name="ce31"/>
          <table:table-cell table:style-name="ce41"/>
          <table:table-cell table:number-columns-repeated="2" table:style-name="ce31"/>
          <table:table-cell table:number-columns-repeated="2" table:style-name="ce41"/>
          <table:table-cell table:number-columns-repeated="10" table:style-name="ce31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title/>
    <dc:description/>
    <dc:subject/>
    <meta:initial-creator/>
    <dc:creator/>
    <meta:creation-date>2026-04-27T07:53:29Z</meta:creation-date>
    <dc:date>2026-04-27T07:54:01Z</dc:date>
  </office:meta>
</office:document-meta>
</file>