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  <style:map style:condition="of:is-true-formula(AND(NOT(ISBLANK([.C2]));ISBLANK([.E2])))" style:apply-style-name="cf6" style:base-cell-address="Data_Sheet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6" style:base-cell-address="Data_Sheet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6" style:base-cell-address="Data_Sheet.G2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Q2]));ISBLANK([.P2])))" style:apply-style-name="cf6" style:base-cell-address="Data_Sheet.P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P2]));ISBLANK([.Q2])))" style:apply-style-name="cf6" style:base-cell-address="Data_Sheet.Q2"/>
    </style:style>
    <style:style style:name="ce4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6" style:base-cell-address="Data_Sheet.T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6" style:base-cell-address="Data_Sheet.U2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6" style:base-cell-address="Data_Sheet.G5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5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58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6" style:base-cell-address="Data_Sheet.F5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6" style:base-cell-address="Data_Sheet.Y2"/>
    </style:style>
    <style:style style:name="ce6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6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31" table:default-cell-style-name="ce31"/>
        <table:table-column table:style-name="co7" table:default-cell-style-name="ce31"/>
        <table:table-column table:style-name="co6" table:number-columns-repeated="3" table:default-cell-style-name="ce31"/>
        <table:table-column table:style-name="co8" table:default-cell-style-name="ce31"/>
        <table:table-column table:style-name="co9" table:default-cell-style-name="ce31"/>
        <table:table-column table:style-name="co1" table:number-columns-repeated="16342" table:default-cell-style-name="ce3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2">
            <text:p>Home Office</text:p>
          </table:table-cell>
          <table:table-cell office:value-type="float" office:value="138" table:content-validation-name="val2" table:style-name="ce43">
            <text:p>138.00</text:p>
          </table:table-cell>
          <table:table-cell office:value-type="float" office:value="124.03" table:content-validation-name="val1" table:style-name="ce44">
            <text:p>124.03</text:p>
          </table:table-cell>
          <table:table-cell office:value-type="float" office:value="2329" table:content-validation-name="val2" table:style-name="ce43">
            <text:p>2329.00</text:p>
          </table:table-cell>
          <table:table-cell office:value-type="float" office:value="2242.4299999999998" table:content-validation-name="val1" table:style-name="ce44">
            <text:p>2242.43</text:p>
          </table:table-cell>
          <table:table-cell office:value-type="float" office:value="2846" table:content-validation-name="val2" table:style-name="ce43">
            <text:p>2846.00</text:p>
          </table:table-cell>
          <table:table-cell office:value-type="float" office:value="2764.69" table:content-validation-name="val1" table:style-name="ce44">
            <text:p>2764.69</text:p>
          </table:table-cell>
          <table:table-cell office:value-type="float" office:value="613" table:content-validation-name="val2" table:style-name="ce43">
            <text:p>613.00</text:p>
          </table:table-cell>
          <table:table-cell office:value-type="float" office:value="602.6" table:content-validation-name="val1" table:style-name="ce44">
            <text:p>602.60</text:p>
          </table:table-cell>
          <table:table-cell office:value-type="float" office:value="51" table:content-validation-name="val2" table:style-name="ce43">
            <text:p>51.00</text:p>
          </table:table-cell>
          <table:table-cell office:value-type="float" office:value="50.7" table:content-validation-name="val1" table:style-name="ce44">
            <text:p>50.70</text:p>
          </table:table-cell>
          <table:table-cell office:value-type="float" office:value="0" table:content-validation-name="val2" table:style-name="ce47">
            <text:p>0.00</text:p>
          </table:table-cell>
          <table:table-cell office:value-type="float" office:value="0" table:content-validation-name="val1" table:style-name="ce48">
            <text:p>0.00</text:p>
          </table:table-cell>
          <table:table-cell office:value-type="float" office:value="5977" table:content-validation-name="val7" table:style-name="ce8">
            <text:p>5,977</text:p>
          </table:table-cell>
          <table:table-cell office:value-type="float" office:value="5784.45" table:content-validation-name="val7" table:style-name="ce8">
            <text:p>5,784</text:p>
          </table:table-cell>
          <table:table-cell office:value-type="float" office:value="1" table:content-validation-name="val4" table:style-name="ce51">
            <text:p>1</text:p>
          </table:table-cell>
          <table:table-cell office:value-type="float" office:value="1" table:content-validation-name="val1" table:style-name="ce52">
            <text:p>1.00</text:p>
          </table:table-cell>
          <table:table-cell office:value-type="float" office:value="165" table:content-validation-name="val4" table:style-name="ce51">
            <text:p>165</text:p>
          </table:table-cell>
          <table:table-cell office:value-type="float" office:value="162.52000000000001" table:content-validation-name="val1" table:style-name="ce52">
            <text:p>162.52</text:p>
          </table:table-cell>
          <table:table-cell office:value-type="float" office:value="0" table:content-validation-name="val1" table:style-name="ce52">
            <text:p>0.00</text:p>
          </table:table-cell>
          <table:table-cell office:value-type="float" office:value="0" table:content-validation-name="val3" table:style-name="ce59">
            <text:p>0.00</text:p>
          </table:table-cell>
          <table:table-cell office:value-type="float" office:value="166" table:style-name="ce10">
            <text:p>166</text:p>
          </table:table-cell>
          <table:table-cell office:value-type="float" office:value="163.52000000000001" table:style-name="ce10">
            <text:p>164</text:p>
          </table:table-cell>
          <table:table-cell table:content-validation-name="val6" table:style-name="ce11"/>
          <table:table-cell office:value-type="float" office:value="6143" table:content-validation-name="val7" table:style-name="ce12">
            <text:p>6,143</text:p>
          </table:table-cell>
          <table:table-cell office:value-type="float" office:value="5947.97" table:content-validation-name="val7" table:style-name="ce12">
            <text:p>5,948</text:p>
          </table:table-cell>
          <table:table-cell office:value-type="currency" office:value="23963167.940000001" table:style-name="ce13">
            <text:p>£23,963,167.94</text:p>
          </table:table-cell>
          <table:table-cell office:value-type="currency" office:value="1139037.43" table:style-name="ce13">
            <text:p>£1,139,037.43</text:p>
          </table:table-cell>
          <table:table-cell office:value-type="currency" office:value="158701.06" table:style-name="ce13">
            <text:p>£158,701.06</text:p>
          </table:table-cell>
          <table:table-cell office:value-type="currency" office:value="1569881.1800000002" table:style-name="ce13">
            <text:p>£1,569,881.18</text:p>
          </table:table-cell>
          <table:table-cell office:value-type="currency" office:value="7163307.9100000001" table:style-name="ce13">
            <text:p>£7,163,307.91</text:p>
          </table:table-cell>
          <table:table-cell office:value-type="currency" office:value="3594602.53" table:style-name="ce13">
            <text:p>£3,594,602.53</text:p>
          </table:table-cell>
          <table:table-cell office:value-type="currency" office:value="37588698.049999997" table:style-name="ce14">
            <text:p>£37,588,698.05</text:p>
          </table:table-cell>
          <table:table-cell office:value-type="currency" office:value="1825775.06" table:content-validation-name="val5" table:style-name="ce15">
            <text:p>£1,825,775.06</text:p>
          </table:table-cell>
          <table:table-cell table:content-validation-name="val5" table:style-name="ce16"/>
          <table:table-cell office:value-type="currency" office:value="1825775.06" table:style-name="ce17">
            <text:p>£1,825,775.06</text:p>
          </table:table-cell>
          <table:table-cell office:value-type="currency" office:value="39414473.109999999" table:style-name="ce18">
            <text:p>£39,414,473.11</text:p>
          </table:table-cell>
          <table:table-cell table:style-name="ce19"/>
          <table:table-cell table:number-columns-repeated="9" table:style-name="ce20"/>
          <table:table-cell table:number-columns-repeated="16333" table:style-name="ce21"/>
        </table:table-row>
        <table:table-row table:number-rows-repeated="2"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style-name="ce32"/>
          <table:table-cell table:style-name="ce22"/>
          <table:table-cell table:number-columns-repeated="3" table:style-name="ce32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36"/>
          <table:table-cell table:number-columns-repeated="2" table:style-name="ce24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8"/>
          <table:table-cell table:content-validation-name="val5" table:style-name="ce38"/>
          <table:table-cell table:content-validation-name="val5" table:style-name="ce38"/>
          <table:table-cell table:style-name="ce28"/>
          <table:table-cell table:style-name="ce30"/>
          <table:table-cell table:style-name="ce32"/>
          <table:table-cell table:number-columns-repeated="9" table:style-name="ce39"/>
          <table:table-cell table:number-columns-repeated="16333" table:style-name="ce40"/>
        </table:table-row>
        <table:table-row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5" table:style-name="ce22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6343" table:style-name="ce31"/>
        </table:table-row>
        <table:table-row table:number-rows-repeated="5"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0" table:style-name="ce31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title/>
    <dc:description/>
    <dc:subject/>
    <meta:initial-creator/>
    <dc:creator/>
    <meta:creation-date>2026-06-19T07:48:47Z</meta:creation-date>
    <dc:date>2026-06-19T07:49:42Z</dc:date>
  </office:meta>
</office:document-meta>
</file>